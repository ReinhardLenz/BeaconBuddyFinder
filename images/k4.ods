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gle-distance" table:style-name="ta1">
        <table:shapes>
          <draw:frame draw:z-index="1" draw:id="id0" draw:style-name="a0" draw:name="Chart 1" svg:x="0in" svg:y="0in" svg:width="10.13211in" svg:height="6.6056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x-y-path">
        <table:shapes>
          <draw:frame draw:z-index="1" draw:id="id1" draw:style-name="a1" draw:name="Chart 1" svg:x="0in" svg:y="0in" svg:width="10.13211in" svg:height="6.6056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k4" table:style-name="ta2">
        <table:table-column table:style-name="co1" table:number-columns-repeated="16384" table:default-cell-style-name="ce1"/>
        <table:table-row table:style-name="ro1">
          <table:table-cell office:value-type="float" office:value="23.5" table:style-name="ce1">
            <text:p>23.5</text:p>
          </table:table-cell>
          <table:table-cell office:value-type="float" office:value="82.6" table:style-name="ce1">
            <text:p>82.6</text:p>
          </table:table-cell>
          <table:table-cell table:style-name="ce1"/>
          <table:table-cell office:value-type="float" office:value="3.0266965195727309" table:formula="of:=[.A1]*COS([.B1]*PI()/180)" table:style-name="ce1">
            <text:p>3.02669652</text:p>
          </table:table-cell>
          <table:table-cell office:value-type="float" office:value="23.304272316002624" table:formula="of:=[.A1]*SIN([.B1]*PI()/180)" table:style-name="ce1">
            <text:p>23.30427232</text:p>
          </table:table-cell>
          <table:table-cell table:number-columns-repeated="16379"/>
        </table:table-row>
        <table:table-row table:style-name="ro1">
          <table:table-cell office:value-type="float" office:value="38.6" table:style-name="ce1">
            <text:p>38.6</text:p>
          </table:table-cell>
          <table:table-cell office:value-type="float" office:value="84.2" table:style-name="ce1">
            <text:p>84.2</text:p>
          </table:table-cell>
          <table:table-cell table:style-name="ce1"/>
          <table:table-cell office:value-type="float" office:value="3.900773071261737" table:formula="of:=[.A2]*COS([.B2]*PI()/180)" table:style-name="ce1">
            <text:p>3.900773071</text:p>
          </table:table-cell>
          <table:table-cell office:value-type="float" office:value="38.402395360791225" table:formula="of:=[.A2]*SIN([.B2]*PI()/180)" table:style-name="ce1">
            <text:p>38.40239536</text:p>
          </table:table-cell>
          <table:table-cell table:number-columns-repeated="16379"/>
        </table:table-row>
        <table:table-row table:style-name="ro1">
          <table:table-cell office:value-type="float" office:value="31.3" table:style-name="ce1">
            <text:p>31.3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.7279747480016998" table:formula="of:=[.A3]*COS([.B3]*PI()/180)" table:style-name="ce1">
            <text:p>2.727974748</text:p>
          </table:table-cell>
          <table:table-cell office:value-type="float" office:value="31.180894050271636" table:formula="of:=[.A3]*SIN([.B3]*PI()/180)" table:style-name="ce1">
            <text:p>31.18089405</text:p>
          </table:table-cell>
          <table:table-cell table:number-columns-repeated="16379"/>
        </table:table-row>
        <table:table-row table:style-name="ro1">
          <table:table-cell office:value-type="float" office:value="29.7" table:style-name="ce1">
            <text:p>29.7</text:p>
          </table:table-cell>
          <table:table-cell office:value-type="float" office:value="91.1" table:style-name="ce1">
            <text:p>91.1</text:p>
          </table:table-cell>
          <table:table-cell table:style-name="ce1"/>
          <table:table-cell office:value-type="float" office:value="-0.57016403927077874" table:formula="of:=[.A4]*COS([.B4]*PI()/180)" table:style-name="ce1">
            <text:p>-0.570164039</text:p>
          </table:table-cell>
          <table:table-cell office:value-type="float" office:value="29.694526650012833" table:formula="of:=[.A4]*SIN([.B4]*PI()/180)" table:style-name="ce1">
            <text:p>29.69452665</text:p>
          </table:table-cell>
          <table:table-cell table:number-columns-repeated="16379"/>
        </table:table-row>
        <table:table-row table:style-name="ro1">
          <table:table-cell office:value-type="float" office:value="26.1" table:style-name="ce1">
            <text:p>26.1</text:p>
          </table:table-cell>
          <table:table-cell office:value-type="float" office:value="93.2" table:style-name="ce1">
            <text:p>93.2</text:p>
          </table:table-cell>
          <table:table-cell table:style-name="ce1"/>
          <table:table-cell office:value-type="float" office:value="-1.4569412803215758" table:formula="of:=[.A5]*COS([.B5]*PI()/180)" table:style-name="ce1">
            <text:p>-1.45694128</text:p>
          </table:table-cell>
          <table:table-cell office:value-type="float" office:value="26.059303945149708" table:formula="of:=[.A5]*SIN([.B5]*PI()/180)" table:style-name="ce1">
            <text:p>26.05930395</text:p>
          </table:table-cell>
          <table:table-cell table:number-columns-repeated="16379"/>
        </table:table-row>
        <table:table-row table:style-name="ro1">
          <table:table-cell office:value-type="float" office:value="24.9" table:style-name="ce1">
            <text:p>24.9</text:p>
          </table:table-cell>
          <table:table-cell office:value-type="float" office:value="106.5" table:style-name="ce1">
            <text:p>106.5</text:p>
          </table:table-cell>
          <table:table-cell table:style-name="ce1"/>
          <table:table-cell office:value-type="float" office:value="-7.0719820831276738" table:formula="of:=[.A6]*COS([.B6]*PI()/180)" table:style-name="ce1">
            <text:p>-7.071982083</text:p>
          </table:table-cell>
          <table:table-cell office:value-type="float" office:value="23.874611398218004" table:formula="of:=[.A6]*SIN([.B6]*PI()/180)" table:style-name="ce1">
            <text:p>23.8746114</text:p>
          </table:table-cell>
          <table:table-cell table:number-columns-repeated="16379"/>
        </table:table-row>
        <table:table-row table:style-name="ro1">
          <table:table-cell office:value-type="float" office:value="16.100000000000001" table:style-name="ce1">
            <text:p>16.1</text:p>
          </table:table-cell>
          <table:table-cell office:value-type="float" office:value="126.8" table:style-name="ce1">
            <text:p>126.8</text:p>
          </table:table-cell>
          <table:table-cell table:style-name="ce1"/>
          <table:table-cell office:value-type="float" office:value="-9.644279936100931" table:formula="of:=[.A7]*COS([.B7]*PI()/180)" table:style-name="ce1">
            <text:p>-9.644279936</text:p>
          </table:table-cell>
          <table:table-cell office:value-type="float" office:value="12.89177507227461" table:formula="of:=[.A7]*SIN([.B7]*PI()/180)" table:style-name="ce1">
            <text:p>12.89177507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117.2" table:style-name="ce1">
            <text:p>117.2</text:p>
          </table:table-cell>
          <table:table-cell table:style-name="ce1"/>
          <table:table-cell office:value-type="float" office:value="-7.0850178694097616" table:formula="of:=[.A8]*COS([.B8]*PI()/180)" table:style-name="ce1">
            <text:p>-7.085017869</text:p>
          </table:table-cell>
          <table:table-cell office:value-type="float" office:value="13.78595378601511" table:formula="of:=[.A8]*SIN([.B8]*PI()/180)" table:style-name="ce1">
            <text:p>13.78595379</text:p>
          </table:table-cell>
          <table:table-cell table:number-columns-repeated="16379"/>
        </table:table-row>
        <table:table-row table:style-name="ro1">
          <table:table-cell office:value-type="float" office:value="18.8" table:style-name="ce1">
            <text:p>18.8</text:p>
          </table:table-cell>
          <table:table-cell office:value-type="float" office:value="97.1" table:style-name="ce1">
            <text:p>97.1</text:p>
          </table:table-cell>
          <table:table-cell table:style-name="ce1"/>
          <table:table-cell office:value-type="float" office:value="-2.3237077627212588" table:formula="of:=[.A9]*COS([.B9]*PI()/180)" table:style-name="ce1">
            <text:p>-2.323707763</text:p>
          </table:table-cell>
          <table:table-cell office:value-type="float" office:value="18.655840432247189" table:formula="of:=[.A9]*SIN([.B9]*PI()/180)" table:style-name="ce1">
            <text:p>18.65584043</text:p>
          </table:table-cell>
          <table:table-cell table:number-columns-repeated="16379"/>
        </table:table-row>
        <table:table-row table:style-name="ro1">
          <table:table-cell office:value-type="float" office:value="18.399999999999999" table:style-name="ce1">
            <text:p>18.4</text:p>
          </table:table-cell>
          <table:table-cell office:value-type="float" office:value="93.2" table:style-name="ce1">
            <text:p>93.2</text:p>
          </table:table-cell>
          <table:table-cell table:style-name="ce1"/>
          <table:table-cell office:value-type="float" office:value="-1.0271156918742141" table:formula="of:=[.A10]*COS([.B10]*PI()/180)" table:style-name="ce1">
            <text:p>-1.027115692</text:p>
          </table:table-cell>
          <table:table-cell office:value-type="float" office:value="18.371310060948449" table:formula="of:=[.A10]*SIN([.B10]*PI()/180)" table:style-name="ce1">
            <text:p>18.37131006</text:p>
          </table:table-cell>
          <table:table-cell table:number-columns-repeated="16379"/>
        </table:table-row>
        <table:table-row table:style-name="ro1">
          <table:table-cell office:value-type="float" office:value="17.100000000000001" table:style-name="ce1">
            <text:p>17.1</text:p>
          </table:table-cell>
          <table:table-cell office:value-type="float" office:value="101.2" table:style-name="ce1">
            <text:p>101.2</text:p>
          </table:table-cell>
          <table:table-cell table:style-name="ce1"/>
          <table:table-cell office:value-type="float" office:value="-3.3214074058615246" table:formula="of:=[.A11]*COS([.B11]*PI()/180)" table:style-name="ce1">
            <text:p>-3.321407406</text:p>
          </table:table-cell>
          <table:table-cell office:value-type="float" office:value="16.774333156471176" table:formula="of:=[.A11]*SIN([.B11]*PI()/180)" table:style-name="ce1">
            <text:p>16.77433316</text:p>
          </table:table-cell>
          <table:table-cell table:number-columns-repeated="16379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-3.6384130967843875" table:formula="of:=[.A12]*COS([.B12]*PI()/180)" table:style-name="ce1">
            <text:p>-3.638413097</text:p>
          </table:table-cell>
          <table:table-cell office:value-type="float" office:value="12.688654386385808" table:formula="of:=[.A12]*SIN([.B12]*PI()/180)" table:style-name="ce1">
            <text:p>12.68865439</text:p>
          </table:table-cell>
          <table:table-cell table:number-columns-repeated="16379"/>
        </table:table-row>
        <table:table-row table:style-name="ro1">
          <table:table-cell office:value-type="float" office:value="11.2" table:style-name="ce1">
            <text:p>11.2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-2.3286109371589019" table:formula="of:=[.A13]*COS([.B13]*PI()/180)" table:style-name="ce1">
            <text:p>-2.328610937</text:p>
          </table:table-cell>
          <table:table-cell office:value-type="float" office:value="10.955253128218622" table:formula="of:=[.A13]*SIN([.B13]*PI()/180)" table:style-name="ce1">
            <text:p>10.95525313</text:p>
          </table:table-cell>
          <table:table-cell table:number-columns-repeated="16379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91.9" table:style-name="ce1">
            <text:p>91.9</text:p>
          </table:table-cell>
          <table:table-cell table:style-name="ce1"/>
          <table:table-cell office:value-type="float" office:value="-0.29508108765788282" table:formula="of:=[.A14]*COS([.B14]*PI()/180)" table:style-name="ce1">
            <text:p>-0.295081088</text:p>
          </table:table-cell>
          <table:table-cell office:value-type="float" office:value="8.8951069218816396" table:formula="of:=[.A14]*SIN([.B14]*PI()/180)" table:style-name="ce1">
            <text:p>8.89510692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8.7" table:style-name="ce1">
            <text:p>108.7</text:p>
          </table:table-cell>
          <table:table-cell table:style-name="ce1"/>
          <table:table-cell office:value-type="float" office:value="-2.8855169152710869" table:formula="of:=[.A15]*COS([.B15]*PI()/180)" table:style-name="ce1">
            <text:p>-2.885516915</text:p>
          </table:table-cell>
          <table:table-cell office:value-type="float" office:value="8.5248924997142588" table:formula="of:=[.A15]*SIN([.B15]*PI()/180)" table:style-name="ce1">
            <text:p>8.5248925</text:p>
          </table:table-cell>
          <table:table-cell table:number-columns-repeated="16379"/>
        </table:table-row>
        <table:table-row table:style-name="ro1">
          <table:table-cell office:value-type="float" office:value="15.3" table:style-name="ce1">
            <text:p>15.3</text:p>
          </table:table-cell>
          <table:table-cell office:value-type="float" office:value="97.2" table:style-name="ce1">
            <text:p>97.2</text:p>
          </table:table-cell>
          <table:table-cell table:style-name="ce1"/>
          <table:table-cell office:value-type="float" office:value="-1.9175984735338569" table:formula="of:=[.A16]*COS([.B16]*PI()/180)" table:style-name="ce1">
            <text:p>-1.917598474</text:p>
          </table:table-cell>
          <table:table-cell office:value-type="float" office:value="15.179354930111511" table:formula="of:=[.A16]*SIN([.B16]*PI()/180)" table:style-name="ce1">
            <text:p>15.17935493</text:p>
          </table:table-cell>
          <table:table-cell table:number-columns-repeated="16379"/>
        </table:table-row>
        <table:table-row table:style-name="ro1">
          <table:table-cell office:value-type="float" office:value="18.899999999999999" table:style-name="ce1">
            <text:p>18.9</text:p>
          </table:table-cell>
          <table:table-cell office:value-type="float" office:value="96.1" table:style-name="ce1">
            <text:p>96.1</text:p>
          </table:table-cell>
          <table:table-cell table:style-name="ce1"/>
          <table:table-cell office:value-type="float" office:value="-2.008390948254807" table:formula="of:=[.A17]*COS([.B17]*PI()/180)" table:style-name="ce1">
            <text:p>-2.008390948</text:p>
          </table:table-cell>
          <table:table-cell office:value-type="float" office:value="18.792987144117568" table:formula="of:=[.A17]*SIN([.B17]*PI()/180)" table:style-name="ce1">
            <text:p>18.79298714</text:p>
          </table:table-cell>
          <table:table-cell table:number-columns-repeated="16379"/>
        </table:table-row>
        <table:table-row table:style-name="ro1">
          <table:table-cell office:value-type="float" office:value="26.9" table:style-name="ce1">
            <text:p>26.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-4.6711359792404252" table:formula="of:=[.A18]*COS([.B18]*PI()/180)" table:style-name="ce1">
            <text:p>-4.671135979</text:p>
          </table:table-cell>
          <table:table-cell office:value-type="float" office:value="26.491328556028396" table:formula="of:=[.A18]*SIN([.B18]*PI()/180)" table:style-name="ce1">
            <text:p>26.49132856</text:p>
          </table:table-cell>
          <table:table-cell table:number-columns-repeated="16379"/>
        </table:table-row>
        <table:table-row table:style-name="ro1">
          <table:table-cell office:value-type="float" office:value="29.8" table:style-name="ce1">
            <text:p>29.8</text:p>
          </table:table-cell>
          <table:table-cell office:value-type="float" office:value="100.2" table:style-name="ce1">
            <text:p>100.2</text:p>
          </table:table-cell>
          <table:table-cell table:style-name="ce1"/>
          <table:table-cell office:value-type="float" office:value="-5.2771252615235813" table:formula="of:=[.A19]*COS([.B19]*PI()/180)" table:style-name="ce1">
            <text:p>-5.277125262</text:p>
          </table:table-cell>
          <table:table-cell office:value-type="float" office:value="29.329029117483412" table:formula="of:=[.A19]*SIN([.B19]*PI()/180)" table:style-name="ce1">
            <text:p>29.32902912</text:p>
          </table:table-cell>
          <table:table-cell table:number-columns-repeated="16379"/>
        </table:table-row>
        <table:table-row table:style-name="ro1">
          <table:table-cell office:value-type="float" office:value="30.7" table:style-name="ce1">
            <text:p>30.7</text:p>
          </table:table-cell>
          <table:table-cell office:value-type="float" office:value="101.5" table:style-name="ce1">
            <text:p>101.5</text:p>
          </table:table-cell>
          <table:table-cell table:style-name="ce1"/>
          <table:table-cell office:value-type="float" office:value="-6.1205955866079496" table:formula="of:=[.A20]*COS([.B20]*PI()/180)" table:style-name="ce1">
            <text:p>-6.120595587</text:p>
          </table:table-cell>
          <table:table-cell office:value-type="float" office:value="30.083688431859468" table:formula="of:=[.A20]*SIN([.B20]*PI()/180)" table:style-name="ce1">
            <text:p>30.08368843</text:p>
          </table:table-cell>
          <table:table-cell table:number-columns-repeated="16379"/>
        </table:table-row>
        <table:table-row table:style-name="ro1">
          <table:table-cell office:value-type="float" office:value="37.299999999999997" table:style-name="ce1">
            <text:p>37.3</text:p>
          </table:table-cell>
          <table:table-cell office:value-type="float" office:value="97.8" table:style-name="ce1">
            <text:p>97.8</text:p>
          </table:table-cell>
          <table:table-cell table:style-name="ce1"/>
          <table:table-cell office:value-type="float" office:value="-5.0621908517995502" table:formula="of:=[.A21]*COS([.B21]*PI()/180)" table:style-name="ce1">
            <text:p>-5.062190852</text:p>
          </table:table-cell>
          <table:table-cell office:value-type="float" office:value="36.954894449584842" table:formula="of:=[.A21]*SIN([.B21]*PI()/180)" table:style-name="ce1">
            <text:p>36.9548944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4.8" table:style-name="ce1">
            <text:p>94.8</text:p>
          </table:table-cell>
          <table:table-cell table:style-name="ce1"/>
          <table:table-cell office:value-type="float" office:value="-4.1838921666157667" table:formula="of:=[.A22]*COS([.B22]*PI()/180)" table:style-name="ce1">
            <text:p>-4.183892167</text:p>
          </table:table-cell>
          <table:table-cell office:value-type="float" office:value="49.824642962475217" table:formula="of:=[.A22]*SIN([.B22]*PI()/180)" table:style-name="ce1">
            <text:p>49.82464296</text:p>
          </table:table-cell>
          <table:table-cell table:number-columns-repeated="16379"/>
        </table:table-row>
        <table:table-row table:style-name="ro1">
          <table:table-cell office:value-type="float" office:value="58.7" table:style-name="ce1">
            <text:p>58.7</text:p>
          </table:table-cell>
          <table:table-cell office:value-type="float" office:value="99.3" table:style-name="ce1">
            <text:p>99.3</text:p>
          </table:table-cell>
          <table:table-cell table:style-name="ce1"/>
          <table:table-cell office:value-type="float" office:value="-9.4861442987672895" table:formula="of:=[.A23]*COS([.B23]*PI()/180)" table:style-name="ce1">
            <text:p>-9.486144299</text:p>
          </table:table-cell>
          <table:table-cell office:value-type="float" office:value="57.928430553079593" table:formula="of:=[.A23]*SIN([.B23]*PI()/180)" table:style-name="ce1">
            <text:p>57.92843055</text:p>
          </table:table-cell>
          <table:table-cell table:number-columns-repeated="16379"/>
        </table:table-row>
        <table:table-row table:style-name="ro1">
          <table:table-cell office:value-type="float" office:value="118.6" table:style-name="ce1">
            <text:p>118.6</text:p>
          </table:table-cell>
          <table:table-cell office:value-type="float" office:value="94.6" table:style-name="ce1">
            <text:p>94.6</text:p>
          </table:table-cell>
          <table:table-cell table:style-name="ce1"/>
          <table:table-cell office:value-type="float" office:value="-9.5115924254026734" table:formula="of:=[.A24]*COS([.B24]*PI()/180)" table:style-name="ce1">
            <text:p>-9.511592425</text:p>
          </table:table-cell>
          <table:table-cell office:value-type="float" office:value="118.21797498491091" table:formula="of:=[.A24]*SIN([.B24]*PI()/180)" table:style-name="ce1">
            <text:p>118.217975</text:p>
          </table:table-cell>
          <table:table-cell table:number-columns-repeated="16379"/>
        </table:table-row>
        <table:table-row table:style-name="ro1">
          <table:table-cell office:value-type="float" office:value="90.1" table:style-name="ce1">
            <text:p>90.1</text:p>
          </table:table-cell>
          <table:table-cell office:value-type="float" office:value="90.5" table:style-name="ce1">
            <text:p>90.5</text:p>
          </table:table-cell>
          <table:table-cell table:style-name="ce1"/>
          <table:table-cell office:value-type="float" office:value="-0.7862608484034771" table:formula="of:=[.A25]*COS([.B25]*PI()/180)" table:style-name="ce1">
            <text:p>-0.786260848</text:p>
          </table:table-cell>
          <table:table-cell office:value-type="float" office:value="90.096569268081836" table:formula="of:=[.A25]*SIN([.B25]*PI()/180)" table:style-name="ce1">
            <text:p>90.09656927</text:p>
          </table:table-cell>
          <table:table-cell table:number-columns-repeated="16379"/>
        </table:table-row>
        <table:table-row table:style-name="ro1">
          <table:table-cell office:value-type="float" office:value="65.400000000000006" table:style-name="ce1">
            <text:p>65.4</text:p>
          </table:table-cell>
          <table:table-cell office:value-type="float" office:value="87.6" table:style-name="ce1">
            <text:p>87.6</text:p>
          </table:table-cell>
          <table:table-cell table:style-name="ce1"/>
          <table:table-cell office:value-type="float" office:value="2.7386677538896782" table:formula="of:=[.A26]*COS([.B26]*PI()/180)" table:style-name="ce1">
            <text:p>2.738667754</text:p>
          </table:table-cell>
          <table:table-cell office:value-type="float" office:value="65.342633088465348" table:formula="of:=[.A26]*SIN([.B26]*PI()/180)" table:style-name="ce1">
            <text:p>65.3426330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5.5" table:style-name="ce1">
            <text:p>85.5</text:p>
          </table:table-cell>
          <table:table-cell table:style-name="ce1"/>
          <table:table-cell office:value-type="float" office:value="4.7860048393985446" table:formula="of:=[.A27]*COS([.B27]*PI()/180)" table:style-name="ce1">
            <text:p>4.786004839</text:p>
          </table:table-cell>
          <table:table-cell office:value-type="float" office:value="60.811957357720807" table:formula="of:=[.A27]*SIN([.B27]*PI()/180)" table:style-name="ce1">
            <text:p>60.8119573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7.6" table:style-name="ce1">
            <text:p>87.6</text:p>
          </table:table-cell>
          <table:table-cell table:style-name="ce1"/>
          <table:table-cell office:value-type="float" office:value="2.5544148774811983" table:formula="of:=[.A28]*COS([.B28]*PI()/180)" table:style-name="ce1">
            <text:p>2.554414877</text:p>
          </table:table-cell>
          <table:table-cell office:value-type="float" office:value="60.946492636030364" table:formula="of:=[.A28]*SIN([.B28]*PI()/180)" table:style-name="ce1">
            <text:p>60.94649264</text:p>
          </table:table-cell>
          <table:table-cell table:number-columns-repeated="16379"/>
        </table:table-row>
        <table:table-row table:style-name="ro1">
          <table:table-cell office:value-type="float" office:value="65.2" table:style-name="ce1">
            <text:p>65.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-1.1378968997108827" table:formula="of:=[.A29]*COS([.B29]*PI()/180)" table:style-name="ce1">
            <text:p>-1.1378969</text:p>
          </table:table-cell>
          <table:table-cell office:value-type="float" office:value="65.190069724196718" table:formula="of:=[.A29]*SIN([.B29]*PI()/180)" table:style-name="ce1">
            <text:p>65.19006972</text:p>
          </table:table-cell>
          <table:table-cell table:number-columns-repeated="16379"/>
        </table:table-row>
        <table:table-row table:style-name="ro1">
          <table:table-cell office:value-type="float" office:value="71.3" table:style-name="ce1">
            <text:p>71.3</text:p>
          </table:table-cell>
          <table:table-cell office:value-type="float" office:value="91.4" table:style-name="ce1">
            <text:p>91.4</text:p>
          </table:table-cell>
          <table:table-cell table:style-name="ce1"/>
          <table:table-cell office:value-type="float" office:value="-1.7420143022841676" table:formula="of:=[.A30]*COS([.B30]*PI()/180)" table:style-name="ce1">
            <text:p>-1.742014302</text:p>
          </table:table-cell>
          <table:table-cell office:value-type="float" office:value="71.278716221398355" table:formula="of:=[.A30]*SIN([.B30]*PI()/180)" table:style-name="ce1">
            <text:p>71.27871622</text:p>
          </table:table-cell>
          <table:table-cell table:number-columns-repeated="16379"/>
        </table:table-row>
        <table:table-row table:style-name="ro1">
          <table:table-cell office:value-type="float" office:value="78.400000000000006" table:style-name="ce1">
            <text:p>78.4</text:p>
          </table:table-cell>
          <table:table-cell office:value-type="float" office:value="90.2" table:style-name="ce1">
            <text:p>90.2</text:p>
          </table:table-cell>
          <table:table-cell table:style-name="ce1"/>
          <table:table-cell office:value-type="float" office:value="-0.27366707095353621" table:formula="of:=[.A31]*COS([.B31]*PI()/180)" table:style-name="ce1">
            <text:p>-0.273667071</text:p>
          </table:table-cell>
          <table:table-cell office:value-type="float" office:value="78.399522360370767" table:formula="of:=[.A31]*SIN([.B31]*PI()/180)" table:style-name="ce1">
            <text:p>78.39952236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.5</text:p>
          </table:table-cell>
          <table:table-cell office:value-type="float" office:value="89.8" table:style-name="ce1">
            <text:p>89.8</text:p>
          </table:table-cell>
          <table:table-cell table:style-name="ce1"/>
          <table:table-cell office:value-type="float" office:value="0.28099743892553364" table:formula="of:=[.A32]*COS([.B32]*PI()/180)" table:style-name="ce1">
            <text:p>0.280997439</text:p>
          </table:table-cell>
          <table:table-cell office:value-type="float" office:value="80.499509566452133" table:formula="of:=[.A32]*SIN([.B32]*PI()/180)" table:style-name="ce1">
            <text:p>80.49950957</text:p>
          </table:table-cell>
          <table:table-cell table:number-columns-repeated="16379"/>
        </table:table-row>
        <table:table-row table:style-name="ro1">
          <table:table-cell office:value-type="float" office:value="76.599999999999994" table:style-name="ce1">
            <text:p>76.6</text:p>
          </table:table-cell>
          <table:table-cell office:value-type="float" office:value="86.3" table:style-name="ce1">
            <text:p>86.3</text:p>
          </table:table-cell>
          <table:table-cell table:style-name="ce1"/>
          <table:table-cell office:value-type="float" office:value="4.9431748121765837" table:formula="of:=[.A33]*COS([.B33]*PI()/180)" table:style-name="ce1">
            <text:p>4.943174812</text:p>
          </table:table-cell>
          <table:table-cell office:value-type="float" office:value="76.44033635964891" table:formula="of:=[.A33]*SIN([.B33]*PI()/180)" table:style-name="ce1">
            <text:p>76.44033636</text:p>
          </table:table-cell>
          <table:table-cell table:number-columns-repeated="16379"/>
        </table:table-row>
        <table:table-row table:style-name="ro1">
          <table:table-cell office:value-type="float" office:value="72.599999999999994" table:style-name="ce1">
            <text:p>72.6</text:p>
          </table:table-cell>
          <table:table-cell office:value-type="float" office:value="84.3" table:style-name="ce1">
            <text:p>84.3</text:p>
          </table:table-cell>
          <table:table-cell table:style-name="ce1"/>
          <table:table-cell office:value-type="float" office:value="7.2106138313881978" table:formula="of:=[.A34]*COS([.B34]*PI()/180)" table:style-name="ce1">
            <text:p>7.210613831</text:p>
          </table:table-cell>
          <table:table-cell office:value-type="float" office:value="72.241034379185024" table:formula="of:=[.A34]*SIN([.B34]*PI()/180)" table:style-name="ce1">
            <text:p>72.24103438</text:p>
          </table:table-cell>
          <table:table-cell table:number-columns-repeated="16379"/>
        </table:table-row>
        <table:table-row table:style-name="ro1">
          <table:table-cell office:value-type="float" office:value="75.400000000000006" table:style-name="ce1">
            <text:p>75.4</text:p>
          </table:table-cell>
          <table:table-cell office:value-type="float" office:value="80.900000000000006" table:style-name="ce1">
            <text:p>80.9</text:p>
          </table:table-cell>
          <table:table-cell table:style-name="ce1"/>
          <table:table-cell office:value-type="float" office:value="11.925118270988056" table:formula="of:=[.A35]*COS([.B35]*PI()/180)" table:style-name="ce1">
            <text:p>11.92511827</text:p>
          </table:table-cell>
          <table:table-cell office:value-type="float" office:value="74.451001029018727" table:formula="of:=[.A35]*SIN([.B35]*PI()/180)" table:style-name="ce1">
            <text:p>74.45100103</text:p>
          </table:table-cell>
          <table:table-cell table:number-columns-repeated="16379"/>
        </table:table-row>
        <table:table-row table:style-name="ro1">
          <table:table-cell office:value-type="float" office:value="73.3" table:style-name="ce1">
            <text:p>73.3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3.986299361100741" table:formula="of:=[.A36]*COS([.B36]*PI()/180)" table:style-name="ce1">
            <text:p>13.98629936</text:p>
          </table:table-cell>
          <table:table-cell office:value-type="float" office:value="71.953272546713762" table:formula="of:=[.A36]*SIN([.B36]*PI()/180)" table:style-name="ce1">
            <text:p>71.95327255</text:p>
          </table:table-cell>
          <table:table-cell table:number-columns-repeated="16379"/>
        </table:table-row>
        <table:table-row table:style-name="ro1">
          <table:table-cell office:value-type="float" office:value="65.8" table:style-name="ce1">
            <text:p>65.8</text:p>
          </table:table-cell>
          <table:table-cell office:value-type="float" office:value="74.7" table:style-name="ce1">
            <text:p>74.7</text:p>
          </table:table-cell>
          <table:table-cell table:style-name="ce1"/>
          <table:table-cell office:value-type="float" office:value="17.362846687721539" table:formula="of:=[.A37]*COS([.B37]*PI()/180)" table:style-name="ce1">
            <text:p>17.36284669</text:p>
          </table:table-cell>
          <table:table-cell office:value-type="float" office:value="63.467878134523112" table:formula="of:=[.A37]*SIN([.B37]*PI()/180)" table:style-name="ce1">
            <text:p>63.46787813</text:p>
          </table:table-cell>
          <table:table-cell table:number-columns-repeated="16379"/>
        </table:table-row>
        <table:table-row table:style-name="ro1">
          <table:table-cell office:value-type="float" office:value="60.2" table:style-name="ce1">
            <text:p>60.2</text:p>
          </table:table-cell>
          <table:table-cell office:value-type="float" office:value="70.900000000000006" table:style-name="ce1">
            <text:p>70.9</text:p>
          </table:table-cell>
          <table:table-cell table:style-name="ce1"/>
          <table:table-cell office:value-type="float" office:value="19.698517518542054" table:formula="of:=[.A38]*COS([.B38]*PI()/180)" table:style-name="ce1">
            <text:p>19.69851752</text:p>
          </table:table-cell>
          <table:table-cell office:value-type="float" office:value="56.88592451188336" table:formula="of:=[.A38]*SIN([.B38]*PI()/180)" table:style-name="ce1">
            <text:p>56.88592451</text:p>
          </table:table-cell>
          <table:table-cell table:number-columns-repeated="16379"/>
        </table:table-row>
        <table:table-row table:style-name="ro1">
          <table:table-cell office:value-type="float" office:value="52.1" table:style-name="ce1">
            <text:p>52.1</text:p>
          </table:table-cell>
          <table:table-cell office:value-type="float" office:value="62.6" table:style-name="ce1">
            <text:p>62.6</text:p>
          </table:table-cell>
          <table:table-cell table:style-name="ce1"/>
          <table:table-cell office:value-type="float" office:value="23.976408787238675" table:formula="of:=[.A39]*COS([.B39]*PI()/180)" table:style-name="ce1">
            <text:p>23.97640879</text:p>
          </table:table-cell>
          <table:table-cell office:value-type="float" office:value="46.255181565606513" table:formula="of:=[.A39]*SIN([.B39]*PI()/180)" table:style-name="ce1">
            <text:p>46.25518157</text:p>
          </table:table-cell>
          <table:table-cell table:number-columns-repeated="16379"/>
        </table:table-row>
        <table:table-row table:style-name="ro1">
          <table:table-cell office:value-type="float" office:value="49.6" table:style-name="ce1">
            <text:p>49.6</text:p>
          </table:table-cell>
          <table:table-cell office:value-type="float" office:value="57.4" table:style-name="ce1">
            <text:p>57.4</text:p>
          </table:table-cell>
          <table:table-cell table:style-name="ce1"/>
          <table:table-cell office:value-type="float" office:value="26.723030936340407" table:formula="of:=[.A40]*COS([.B40]*PI()/180)" table:style-name="ce1">
            <text:p>26.72303094</text:p>
          </table:table-cell>
          <table:table-cell office:value-type="float" office:value="41.78563889155452" table:formula="of:=[.A40]*SIN([.B40]*PI()/180)" table:style-name="ce1">
            <text:p>41.78563889</text:p>
          </table:table-cell>
          <table:table-cell table:number-columns-repeated="16379"/>
        </table:table-row>
        <table:table-row table:style-name="ro1">
          <table:table-cell office:value-type="float" office:value="40.9" table:style-name="ce1">
            <text:p>40.9</text:p>
          </table:table-cell>
          <table:table-cell office:value-type="float" office:value="61.6" table:style-name="ce1">
            <text:p>61.6</text:p>
          </table:table-cell>
          <table:table-cell table:style-name="ce1"/>
          <table:table-cell office:value-type="float" office:value="19.45303015097425" table:formula="of:=[.A41]*COS([.B41]*PI()/180)" table:style-name="ce1">
            <text:p>19.45303015</text:p>
          </table:table-cell>
          <table:table-cell office:value-type="float" office:value="35.977626630244615" table:formula="of:=[.A41]*SIN([.B41]*PI()/180)" table:style-name="ce1">
            <text:p>35.97762663</text:p>
          </table:table-cell>
          <table:table-cell table:number-columns-repeated="16379"/>
        </table:table-row>
        <table:table-row table:style-name="ro1">
          <table:table-cell office:value-type="float" office:value="32.1" table:style-name="ce1">
            <text:p>32.1</text:p>
          </table:table-cell>
          <table:table-cell office:value-type="float" office:value="61.6" table:style-name="ce1">
            <text:p>61.6</text:p>
          </table:table-cell>
          <table:table-cell table:style-name="ce1"/>
          <table:table-cell office:value-type="float" office:value="15.26753711115583" table:formula="of:=[.A42]*COS([.B42]*PI()/180)" table:style-name="ce1">
            <text:p>15.26753711</text:p>
          </table:table-cell>
          <table:table-cell office:value-type="float" office:value="28.236719189018395" table:formula="of:=[.A42]*SIN([.B42]*PI()/180)" table:style-name="ce1">
            <text:p>28.23671919</text:p>
          </table:table-cell>
          <table:table-cell table:number-columns-repeated="16379"/>
        </table:table-row>
        <table:table-row table:style-name="ro1">
          <table:table-cell office:value-type="float" office:value="23.3" table:style-name="ce1">
            <text:p>23.3</text:p>
          </table:table-cell>
          <table:table-cell office:value-type="float" office:value="79.900000000000006" table:style-name="ce1">
            <text:p>79.9</text:p>
          </table:table-cell>
          <table:table-cell table:style-name="ce1"/>
          <table:table-cell office:value-type="float" office:value="4.0860447179432988" table:formula="of:=[.A43]*COS([.B43]*PI()/180)" table:style-name="ce1">
            <text:p>4.086044718</text:p>
          </table:table-cell>
          <table:table-cell office:value-type="float" office:value="22.938924093404374" table:formula="of:=[.A43]*SIN([.B43]*PI()/180)" table:style-name="ce1">
            <text:p>22.93892409</text:p>
          </table:table-cell>
          <table:table-cell table:number-columns-repeated="16379"/>
        </table:table-row>
        <table:table-row table:style-name="ro1">
          <table:table-cell office:value-type="float" office:value="18.899999999999999" table:style-name="ce1">
            <text:p>18.9</text:p>
          </table:table-cell>
          <table:table-cell office:value-type="float" office:value="81.599999999999994" table:style-name="ce1">
            <text:p>81.6</text:p>
          </table:table-cell>
          <table:table-cell table:style-name="ce1"/>
          <table:table-cell office:value-type="float" office:value="2.760969239829584" table:formula="of:=[.A44]*COS([.B44]*PI()/180)" table:style-name="ce1">
            <text:p>2.76096924</text:p>
          </table:table-cell>
          <table:table-cell office:value-type="float" office:value="18.697247093000477" table:formula="of:=[.A44]*SIN([.B44]*PI()/180)" table:style-name="ce1">
            <text:p>18.6972470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1.8" table:style-name="ce1">
            <text:p>81.8</text:p>
          </table:table-cell>
          <table:table-cell table:style-name="ce1"/>
          <table:table-cell office:value-type="float" office:value="0.99840253593858186" table:formula="of:=[.A45]*COS([.B45]*PI()/180)" table:style-name="ce1">
            <text:p>0.998402536</text:p>
          </table:table-cell>
          <table:table-cell office:value-type="float" office:value="6.928433616354523" table:formula="of:=[.A45]*SIN([.B45]*PI()/180)" table:style-name="ce1">
            <text:p>6.928433616</text:p>
          </table:table-cell>
          <table:table-cell table:number-columns-repeated="16379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294.3" table:style-name="ce1">
            <text:p>294.3</text:p>
          </table:table-cell>
          <table:table-cell table:style-name="ce1"/>
          <table:table-cell office:value-type="float" office:value="2.1398746647465661" table:formula="of:=[.A46]*COS([.B46]*PI()/180)" table:style-name="ce1">
            <text:p>2.139874665</text:p>
          </table:table-cell>
          <table:table-cell office:value-type="float" office:value="-4.7392970385043149" table:formula="of:=[.A46]*SIN([.B46]*PI()/180)" table:style-name="ce1">
            <text:p>-4.739297039</text:p>
          </table:table-cell>
          <table:table-cell table:number-columns-repeated="16379"/>
        </table:table-row>
        <table:table-row table:style-name="ro1">
          <table:table-cell office:value-type="float" office:value="13.7" table:style-name="ce1">
            <text:p>13.7</text:p>
          </table:table-cell>
          <table:table-cell office:value-type="float" office:value="277.8" table:style-name="ce1">
            <text:p>277.8</text:p>
          </table:table-cell>
          <table:table-cell table:style-name="ce1"/>
          <table:table-cell office:value-type="float" office:value="1.859303342349973" table:formula="of:=[.A47]*COS([.B47]*PI()/180)" table:style-name="ce1">
            <text:p>1.859303342</text:p>
          </table:table-cell>
          <table:table-cell office:value-type="float" office:value="-13.573245414458777" table:formula="of:=[.A47]*SIN([.B47]*PI()/180)" table:style-name="ce1">
            <text:p>-13.57324541</text:p>
          </table:table-cell>
          <table:table-cell table:number-columns-repeated="16379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271.10000000000002" table:style-name="ce1">
            <text:p>271.1</text:p>
          </table:table-cell>
          <table:table-cell table:style-name="ce1"/>
          <table:table-cell office:value-type="float" office:value="0.34171447471448319" table:formula="of:=[.A48]*COS([.B48]*PI()/180)" table:style-name="ce1">
            <text:p>0.341714475</text:p>
          </table:table-cell>
          <table:table-cell office:value-type="float" office:value="-17.796719675765267" table:formula="of:=[.A48]*SIN([.B48]*PI()/180)" table:style-name="ce1">
            <text:p>-17.79671968</text:p>
          </table:table-cell>
          <table:table-cell table:number-columns-repeated="16379"/>
        </table:table-row>
        <table:table-row table:style-name="ro1">
          <table:table-cell office:value-type="float" office:value="33.700000000000003" table:style-name="ce1">
            <text:p>33.7</text:p>
          </table:table-cell>
          <table:table-cell office:value-type="float" office:value="266.60000000000002" table:style-name="ce1">
            <text:p>266.6</text:p>
          </table:table-cell>
          <table:table-cell table:style-name="ce1"/>
          <table:table-cell office:value-type="float" office:value="-1.9986247895099085" table:formula="of:=[.A49]*COS([.B49]*PI()/180)" table:style-name="ce1">
            <text:p>-1.99862479</text:p>
          </table:table-cell>
          <table:table-cell office:value-type="float" office:value="-33.640682201030891" table:formula="of:=[.A49]*SIN([.B49]*PI()/180)" table:style-name="ce1">
            <text:p>-33.6406822</text:p>
          </table:table-cell>
          <table:table-cell table:number-columns-repeated="16379"/>
        </table:table-row>
        <table:table-row table:style-name="ro1">
          <table:table-cell office:value-type="float" office:value="42.1" table:style-name="ce1">
            <text:p>42.1</text:p>
          </table:table-cell>
          <table:table-cell office:value-type="float" office:value="259.7" table:style-name="ce1">
            <text:p>259.7</text:p>
          </table:table-cell>
          <table:table-cell table:style-name="ce1"/>
          <table:table-cell office:value-type="float" office:value="-7.5275732563983411" table:formula="of:=[.A50]*COS([.B50]*PI()/180)" table:style-name="ce1">
            <text:p>-7.527573256</text:p>
          </table:table-cell>
          <table:table-cell office:value-type="float" office:value="-41.4215600970021" table:formula="of:=[.A50]*SIN([.B50]*PI()/180)" table:style-name="ce1">
            <text:p>-41.4215601</text:p>
          </table:table-cell>
          <table:table-cell table:number-columns-repeated="16379"/>
        </table:table-row>
        <table:table-row table:style-name="ro1">
          <table:table-cell office:value-type="float" office:value="49.9" table:style-name="ce1">
            <text:p>49.9</text:p>
          </table:table-cell>
          <table:table-cell office:value-type="float" office:value="262" table:style-name="ce1">
            <text:p>262</text:p>
          </table:table-cell>
          <table:table-cell table:style-name="ce1"/>
          <table:table-cell office:value-type="float" office:value="-6.9447377379072401" table:formula="of:=[.A51]*COS([.B51]*PI()/180)" table:style-name="ce1">
            <text:p>-6.944737738</text:p>
          </table:table-cell>
          <table:table-cell office:value-type="float" office:value="-49.414376630204359" table:formula="of:=[.A51]*SIN([.B51]*PI()/180)" table:style-name="ce1">
            <text:p>-49.41437663</text:p>
          </table:table-cell>
          <table:table-cell table:number-columns-repeated="16379"/>
        </table:table-row>
        <table:table-row table:style-name="ro1">
          <table:table-cell office:value-type="float" office:value="57.1" table:style-name="ce1">
            <text:p>57.1</text:p>
          </table:table-cell>
          <table:table-cell office:value-type="float" office:value="251.5" table:style-name="ce1">
            <text:p>251.5</text:p>
          </table:table-cell>
          <table:table-cell table:style-name="ce1"/>
          <table:table-cell office:value-type="float" office:value="-18.118095880730792" table:formula="of:=[.A52]*COS([.B52]*PI()/180)" table:style-name="ce1">
            <text:p>-18.11809588</text:p>
          </table:table-cell>
          <table:table-cell office:value-type="float" office:value="-54.149280712273978" table:formula="of:=[.A52]*SIN([.B52]*PI()/180)" table:style-name="ce1">
            <text:p>-54.1492807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6.6" table:style-name="ce1">
            <text:p>246.6</text:p>
          </table:table-cell>
          <table:table-cell table:style-name="ce1"/>
          <table:table-cell office:value-type="float" office:value="-25.020317109991158" table:formula="of:=[.A53]*COS([.B53]*PI()/180)" table:style-name="ce1">
            <text:p>-25.02031711</text:p>
          </table:table-cell>
          <table:table-cell office:value-type="float" office:value="-57.818541418090817" table:formula="of:=[.A53]*SIN([.B53]*PI()/180)" table:style-name="ce1">
            <text:p>-57.81854142</text:p>
          </table:table-cell>
          <table:table-cell table:number-columns-repeated="16379"/>
        </table:table-row>
        <table:table-row table:style-name="ro1">
          <table:table-cell office:value-type="float" office:value="73.8" table:style-name="ce1">
            <text:p>73.8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34.647001333598737" table:formula="of:=[.A54]*COS([.B54]*PI()/180)" table:style-name="ce1">
            <text:p>-34.64700133</text:p>
          </table:table-cell>
          <table:table-cell office:value-type="float" office:value="-65.161532352988814" table:formula="of:=[.A54]*SIN([.B54]*PI()/180)" table:style-name="ce1">
            <text:p>-65.1615323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8.5" table:style-name="ce1">
            <text:p>238.5</text:p>
          </table:table-cell>
          <table:table-cell table:style-name="ce1"/>
          <table:table-cell office:value-type="float" office:value="-43.88987943613968" table:formula="of:=[.A55]*COS([.B55]*PI()/180)" table:style-name="ce1">
            <text:p>-43.88987944</text:p>
          </table:table-cell>
          <table:table-cell office:value-type="float" office:value="-71.621773805743757" table:formula="of:=[.A55]*SIN([.B55]*PI()/180)" table:style-name="ce1">
            <text:p>-71.62177381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.5</text:p>
          </table:table-cell>
          <table:table-cell office:value-type="float" office:value="235" table:style-name="ce1">
            <text:p>235</text:p>
          </table:table-cell>
          <table:table-cell table:style-name="ce1"/>
          <table:table-cell office:value-type="float" office:value="-54.776549671524933" table:formula="of:=[.A56]*COS([.B56]*PI()/180)" table:style-name="ce1">
            <text:p>-54.77654967</text:p>
          </table:table-cell>
          <table:table-cell office:value-type="float" office:value="-78.229020229598689" table:formula="of:=[.A56]*SIN([.B56]*PI()/180)" table:style-name="ce1">
            <text:p>-78.22902023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.5</text:p>
          </table:table-cell>
          <table:table-cell office:value-type="float" office:value="232" table:style-name="ce1">
            <text:p>232</text:p>
          </table:table-cell>
          <table:table-cell table:style-name="ce1"/>
          <table:table-cell office:value-type="float" office:value="-64.952285646856922" table:formula="of:=[.A57]*COS([.B57]*PI()/180)" table:style-name="ce1">
            <text:p>-64.95228565</text:p>
          </table:table-cell>
          <table:table-cell office:value-type="float" office:value="-83.135134505509185" table:formula="of:=[.A57]*SIN([.B57]*PI()/180)" table:style-name="ce1">
            <text:p>-83.13513451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.5</text:p>
          </table:table-cell>
          <table:table-cell office:value-type="float" office:value="228.5" table:style-name="ce1">
            <text:p>228.5</text:p>
          </table:table-cell>
          <table:table-cell table:style-name="ce1"/>
          <table:table-cell office:value-type="float" office:value="-73.882135376054734" table:formula="of:=[.A58]*COS([.B58]*PI()/180)" table:style-name="ce1">
            <text:p>-73.88213538</text:p>
          </table:table-cell>
          <table:table-cell office:value-type="float" office:value="-83.508562867973751" table:formula="of:=[.A58]*SIN([.B58]*PI()/180)" table:style-name="ce1">
            <text:p>-83.50856287</text:p>
          </table:table-cell>
          <table:table-cell table:number-columns-repeated="16379"/>
        </table:table-row>
        <table:table-row table:style-name="ro1">
          <table:table-cell office:value-type="float" office:value="117.8" table:style-name="ce1">
            <text:p>117.8</text:p>
          </table:table-cell>
          <table:table-cell office:value-type="float" office:value="226.8" table:style-name="ce1">
            <text:p>226.8</text:p>
          </table:table-cell>
          <table:table-cell table:style-name="ce1"/>
          <table:table-cell office:value-type="float" office:value="-80.639649078399557" table:formula="of:=[.A59]*COS([.B59]*PI()/180)" table:style-name="ce1">
            <text:p>-80.63964908</text:p>
          </table:table-cell>
          <table:table-cell office:value-type="float" office:value="-85.872504310242249" table:formula="of:=[.A59]*SIN([.B59]*PI()/180)" table:style-name="ce1">
            <text:p>-85.87250431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24.1" table:style-name="ce1">
            <text:p>224.1</text:p>
          </table:table-cell>
          <table:table-cell table:style-name="ce1"/>
          <table:table-cell office:value-type="float" office:value="-85.457029433819486" table:formula="of:=[.A60]*COS([.B60]*PI()/180)" table:style-name="ce1">
            <text:p>-85.45702943</text:p>
          </table:table-cell>
          <table:table-cell office:value-type="float" office:value="-82.813622794485397" table:formula="of:=[.A60]*SIN([.B60]*PI()/180)" table:style-name="ce1">
            <text:p>-82.81362279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21.2" table:style-name="ce1">
            <text:p>221.2</text:p>
          </table:table-cell>
          <table:table-cell table:style-name="ce1"/>
          <table:table-cell office:value-type="float" office:value="-93.299448703069828" table:formula="of:=[.A61]*COS([.B61]*PI()/180)" table:style-name="ce1">
            <text:p>-93.2994487</text:p>
          </table:table-cell>
          <table:table-cell office:value-type="float" office:value="-81.677493054716379" table:formula="of:=[.A61]*SIN([.B61]*PI()/180)" table:style-name="ce1">
            <text:p>-81.67749305</text:p>
          </table:table-cell>
          <table:table-cell table:number-columns-repeated="16379"/>
        </table:table-row>
        <table:table-row table:style-name="ro1">
          <table:table-cell office:value-type="float" office:value="133.1" table:style-name="ce1">
            <text:p>133.1</text:p>
          </table:table-cell>
          <table:table-cell office:value-type="float" office:value="216.3" table:style-name="ce1">
            <text:p>216.3</text:p>
          </table:table-cell>
          <table:table-cell table:style-name="ce1"/>
          <table:table-cell office:value-type="float" office:value="-107.26905436727745" table:formula="of:=[.A62]*COS([.B62]*PI()/180)" table:style-name="ce1">
            <text:p>-107.2690544</text:p>
          </table:table-cell>
          <table:table-cell office:value-type="float" office:value="-78.796954098176116" table:formula="of:=[.A62]*SIN([.B62]*PI()/180)" table:style-name="ce1">
            <text:p>-78.7969541</text:p>
          </table:table-cell>
          <table:table-cell table:number-columns-repeated="16379"/>
        </table:table-row>
        <table:table-row table:style-name="ro1">
          <table:table-cell office:value-type="float" office:value="134.4" table:style-name="ce1">
            <text:p>134.4</text:p>
          </table:table-cell>
          <table:table-cell office:value-type="float" office:value="215.5" table:style-name="ce1">
            <text:p>215.5</text:p>
          </table:table-cell>
          <table:table-cell table:style-name="ce1"/>
          <table:table-cell office:value-type="float" office:value="-109.41712566708931" table:formula="of:=[.A63]*COS([.B63]*PI()/180)" table:style-name="ce1">
            <text:p>-109.4171257</text:p>
          </table:table-cell>
          <table:table-cell office:value-type="float" office:value="-78.046477247550314" table:formula="of:=[.A63]*SIN([.B63]*PI()/180)" table:style-name="ce1">
            <text:p>-78.04647725</text:p>
          </table:table-cell>
          <table:table-cell table:number-columns-repeated="16379"/>
        </table:table-row>
        <table:table-row table:style-name="ro1">
          <table:table-cell office:value-type="float" office:value="141.1" table:style-name="ce1">
            <text:p>141.1</text:p>
          </table:table-cell>
          <table:table-cell office:value-type="float" office:value="213" table:style-name="ce1">
            <text:p>213</text:p>
          </table:table-cell>
          <table:table-cell table:style-name="ce1"/>
          <table:table-cell office:value-type="float" office:value="-118.33641713709933" table:formula="of:=[.A64]*COS([.B64]*PI()/180)" table:style-name="ce1">
            <text:p>-118.3364171</text:p>
          </table:table-cell>
          <table:table-cell office:value-type="float" office:value="-76.848567840620319" table:formula="of:=[.A64]*SIN([.B64]*PI()/180)" table:style-name="ce1">
            <text:p>-76.84856784</text:p>
          </table:table-cell>
          <table:table-cell table:number-columns-repeated="16379"/>
        </table:table-row>
        <table:table-row table:style-name="ro1">
          <table:table-cell office:value-type="float" office:value="146.69999999999999" table:style-name="ce1">
            <text:p>146.7</text:p>
          </table:table-cell>
          <table:table-cell office:value-type="float" office:value="208.4" table:style-name="ce1">
            <text:p>208.4</text:p>
          </table:table-cell>
          <table:table-cell table:style-name="ce1"/>
          <table:table-cell office:value-type="float" office:value="-129.04444563953263" table:formula="of:=[.A65]*COS([.B65]*PI()/180)" table:style-name="ce1">
            <text:p>-129.0444456</text:p>
          </table:table-cell>
          <table:table-cell office:value-type="float" office:value="-69.774071470609385" table:formula="of:=[.A65]*SIN([.B65]*PI()/180)" table:style-name="ce1">
            <text:p>-69.77407147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.5</text:p>
          </table:table-cell>
          <table:table-cell office:value-type="float" office:value="205.4" table:style-name="ce1">
            <text:p>205.4</text:p>
          </table:table-cell>
          <table:table-cell table:style-name="ce1"/>
          <table:table-cell office:value-type="float" office:value="-135.04862628306347" table:formula="of:=[.A66]*COS([.B66]*PI()/180)" table:style-name="ce1">
            <text:p>-135.0486263</text:p>
          </table:table-cell>
          <table:table-cell office:value-type="float" office:value="-64.125802443770354" table:formula="of:=[.A66]*SIN([.B66]*PI()/180)" table:style-name="ce1">
            <text:p>-64.12580244</text:p>
          </table:table-cell>
          <table:table-cell table:number-columns-repeated="16379"/>
        </table:table-row>
        <table:table-row table:style-name="ro1">
          <table:table-cell office:value-type="float" office:value="148.69999999999999" table:style-name="ce1">
            <text:p>148.7</text:p>
          </table:table-cell>
          <table:table-cell office:value-type="float" office:value="201.8" table:style-name="ce1">
            <text:p>201.8</text:p>
          </table:table-cell>
          <table:table-cell table:style-name="ce1"/>
          <table:table-cell office:value-type="float" office:value="-138.06584245719182" table:formula="of:=[.A67]*COS([.B67]*PI()/180)" table:style-name="ce1">
            <text:p>-138.0658425</text:p>
          </table:table-cell>
          <table:table-cell office:value-type="float" office:value="-55.222397146319942" table:formula="of:=[.A67]*SIN([.B67]*PI()/180)" table:style-name="ce1">
            <text:p>-55.22239715</text:p>
          </table:table-cell>
          <table:table-cell table:number-columns-repeated="16379"/>
        </table:table-row>
        <table:table-row table:style-name="ro1">
          <table:table-cell office:value-type="float" office:value="152.6" table:style-name="ce1">
            <text:p>152.6</text:p>
          </table:table-cell>
          <table:table-cell office:value-type="float" office:value="200.3" table:style-name="ce1">
            <text:p>200.3</text:p>
          </table:table-cell>
          <table:table-cell table:style-name="ce1"/>
          <table:table-cell office:value-type="float" office:value="-143.12185142177557" table:formula="of:=[.A68]*COS([.B68]*PI()/180)" table:style-name="ce1">
            <text:p>-143.1218514</text:p>
          </table:table-cell>
          <table:table-cell office:value-type="float" office:value="-52.942380430078849" table:formula="of:=[.A68]*SIN([.B68]*PI()/180)" table:style-name="ce1">
            <text:p>-52.94238043</text:p>
          </table:table-cell>
          <table:table-cell table:number-columns-repeated="16379"/>
        </table:table-row>
        <table:table-row table:style-name="ro1">
          <table:table-cell office:value-type="float" office:value="152.80000000000001" table:style-name="ce1">
            <text:p>152.8</text:p>
          </table:table-cell>
          <table:table-cell office:value-type="float" office:value="198.1" table:style-name="ce1">
            <text:p>198.1</text:p>
          </table:table-cell>
          <table:table-cell table:style-name="ce1"/>
          <table:table-cell office:value-type="float" office:value="-145.23880379272535" table:formula="of:=[.A69]*COS([.B69]*PI()/180)" table:style-name="ce1">
            <text:p>-145.2388038</text:p>
          </table:table-cell>
          <table:table-cell office:value-type="float" office:value="-47.471358447575845" table:formula="of:=[.A69]*SIN([.B69]*PI()/180)" table:style-name="ce1">
            <text:p>-47.47135845</text:p>
          </table:table-cell>
          <table:table-cell table:number-columns-repeated="16379"/>
        </table:table-row>
        <table:table-row table:style-name="ro1">
          <table:table-cell office:value-type="float" office:value="149.80000000000001" table:style-name="ce1">
            <text:p>149.8</text:p>
          </table:table-cell>
          <table:table-cell office:value-type="float" office:value="200.5" table:style-name="ce1">
            <text:p>200.5</text:p>
          </table:table-cell>
          <table:table-cell table:style-name="ce1"/>
          <table:table-cell office:value-type="float" office:value="-140.31349394940997" table:formula="of:=[.A70]*COS([.B70]*PI()/180)" table:style-name="ce1">
            <text:p>-140.3134939</text:p>
          </table:table-cell>
          <table:table-cell office:value-type="float" office:value="-52.461065712668201" table:formula="of:=[.A70]*SIN([.B70]*PI()/180)" table:style-name="ce1">
            <text:p>-52.46106571</text:p>
          </table:table-cell>
          <table:table-cell table:number-columns-repeated="16379"/>
        </table:table-row>
        <table:table-row table:style-name="ro1">
          <table:table-cell office:value-type="float" office:value="144.30000000000001" table:style-name="ce1">
            <text:p>144.3</text:p>
          </table:table-cell>
          <table:table-cell office:value-type="float" office:value="202.1" table:style-name="ce1">
            <text:p>202.1</text:p>
          </table:table-cell>
          <table:table-cell table:style-name="ce1"/>
          <table:table-cell office:value-type="float" office:value="-133.69808143480614" table:formula="of:=[.A71]*COS([.B71]*PI()/180)" table:style-name="ce1">
            <text:p>-133.6980814</text:p>
          </table:table-cell>
          <table:table-cell office:value-type="float" office:value="-54.289161171010441" table:formula="of:=[.A71]*SIN([.B71]*PI()/180)" table:style-name="ce1">
            <text:p>-54.28916117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.5</text:p>
          </table:table-cell>
          <table:table-cell office:value-type="float" office:value="202.4" table:style-name="ce1">
            <text:p>202.4</text:p>
          </table:table-cell>
          <table:table-cell table:style-name="ce1"/>
          <table:table-cell office:value-type="float" office:value="-127.12507962169305" table:formula="of:=[.A72]*COS([.B72]*PI()/180)" table:style-name="ce1">
            <text:p>-127.1250796</text:p>
          </table:table-cell>
          <table:table-cell office:value-type="float" office:value="-52.397176748162742" table:formula="of:=[.A72]*SIN([.B72]*PI()/180)" table:style-name="ce1">
            <text:p>-52.39717675</text:p>
          </table:table-cell>
          <table:table-cell table:number-columns-repeated="16379"/>
        </table:table-row>
        <table:table-row table:style-name="ro1">
          <table:table-cell office:value-type="float" office:value="130.30000000000001" table:style-name="ce1">
            <text:p>130.3</text:p>
          </table:table-cell>
          <table:table-cell office:value-type="float" office:value="202.5" table:style-name="ce1">
            <text:p>202.5</text:p>
          </table:table-cell>
          <table:table-cell table:style-name="ce1"/>
          <table:table-cell office:value-type="float" office:value="-120.3815030862207" table:formula="of:=[.A73]*COS([.B73]*PI()/180)" table:style-name="ce1">
            <text:p>-120.3815031</text:p>
          </table:table-cell>
          <table:table-cell office:value-type="float" office:value="-49.863651237171133" table:formula="of:=[.A73]*SIN([.B73]*PI()/180)" table:style-name="ce1">
            <text:p>-49.86365124</text:p>
          </table:table-cell>
          <table:table-cell table:number-columns-repeated="16379"/>
        </table:table-row>
        <table:table-row table:style-name="ro1">
          <table:table-cell office:value-type="float" office:value="120.2" table:style-name="ce1">
            <text:p>120.2</text:p>
          </table:table-cell>
          <table:table-cell office:value-type="float" office:value="204.3" table:style-name="ce1">
            <text:p>204.3</text:p>
          </table:table-cell>
          <table:table-cell table:style-name="ce1"/>
          <table:table-cell office:value-type="float" office:value="-109.55067385158051" table:formula="of:=[.A74]*COS([.B74]*PI()/180)" table:style-name="ce1">
            <text:p>-109.5506739</text:p>
          </table:table-cell>
          <table:table-cell office:value-type="float" office:value="-49.464025904334086" table:formula="of:=[.A74]*SIN([.B74]*PI()/180)" table:style-name="ce1">
            <text:p>-49.4640259</text:p>
          </table:table-cell>
          <table:table-cell table:number-columns-repeated="16379"/>
        </table:table-row>
        <table:table-row table:style-name="ro1">
          <table:table-cell office:value-type="float" office:value="114.9" table:style-name="ce1">
            <text:p>114.9</text:p>
          </table:table-cell>
          <table:table-cell office:value-type="float" office:value="206.6" table:style-name="ce1">
            <text:p>206.6</text:p>
          </table:table-cell>
          <table:table-cell table:style-name="ce1"/>
          <table:table-cell office:value-type="float" office:value="-102.73832181284341" table:formula="of:=[.A75]*COS([.B75]*PI()/180)" table:style-name="ce1">
            <text:p>-102.7383218</text:p>
          </table:table-cell>
          <table:table-cell office:value-type="float" office:value="-51.447519192674626" table:formula="of:=[.A75]*SIN([.B75]*PI()/180)" table:style-name="ce1">
            <text:p>-51.44751919</text:p>
          </table:table-cell>
          <table:table-cell table:number-columns-repeated="16379"/>
        </table:table-row>
        <table:table-row table:style-name="ro1">
          <table:table-cell office:value-type="float" office:value="112.6" table:style-name="ce1">
            <text:p>112.6</text:p>
          </table:table-cell>
          <table:table-cell office:value-type="float" office:value="207.9" table:style-name="ce1">
            <text:p>207.9</text:p>
          </table:table-cell>
          <table:table-cell table:style-name="ce1"/>
          <table:table-cell office:value-type="float" office:value="-99.512009947986868" table:formula="of:=[.A76]*COS([.B76]*PI()/180)" table:style-name="ce1">
            <text:p>-99.51200995</text:p>
          </table:table-cell>
          <table:table-cell office:value-type="float" office:value="-52.688897085740578" table:formula="of:=[.A76]*SIN([.B76]*PI()/180)" table:style-name="ce1">
            <text:p>-52.68889709</text:p>
          </table:table-cell>
          <table:table-cell table:number-columns-repeated="16379"/>
        </table:table-row>
        <table:table-row table:style-name="ro1">
          <table:table-cell office:value-type="float" office:value="117.3" table:style-name="ce1">
            <text:p>117.3</text:p>
          </table:table-cell>
          <table:table-cell office:value-type="float" office:value="213.1" table:style-name="ce1">
            <text:p>213.1</text:p>
          </table:table-cell>
          <table:table-cell table:style-name="ce1"/>
          <table:table-cell office:value-type="float" office:value="-98.264405459577475" table:formula="of:=[.A77]*COS([.B77]*PI()/180)" table:style-name="ce1">
            <text:p>-98.26440546</text:p>
          </table:table-cell>
          <table:table-cell office:value-type="float" office:value="-64.057760026992511" table:formula="of:=[.A77]*SIN([.B77]*PI()/180)" table:style-name="ce1">
            <text:p>-64.05776003</text:p>
          </table:table-cell>
          <table:table-cell table:number-columns-repeated="16379"/>
        </table:table-row>
        <table:table-row table:style-name="ro1">
          <table:table-cell office:value-type="float" office:value="117.9" table:style-name="ce1">
            <text:p>117.9</text:p>
          </table:table-cell>
          <table:table-cell office:value-type="float" office:value="217.4" table:style-name="ce1">
            <text:p>217.4</text:p>
          </table:table-cell>
          <table:table-cell table:style-name="ce1"/>
          <table:table-cell office:value-type="float" office:value="-93.661483761125794" table:formula="of:=[.A78]*COS([.B78]*PI()/180)" table:style-name="ce1">
            <text:p>-93.66148376</text:p>
          </table:table-cell>
          <table:table-cell office:value-type="float" office:value="-71.609611503375518" table:formula="of:=[.A78]*SIN([.B78]*PI()/180)" table:style-name="ce1">
            <text:p>-71.6096115</text:p>
          </table:table-cell>
          <table:table-cell table:number-columns-repeated="16379"/>
        </table:table-row>
        <table:table-row table:style-name="ro1">
          <table:table-cell office:value-type="float" office:value="115.8" table:style-name="ce1">
            <text:p>115.8</text:p>
          </table:table-cell>
          <table:table-cell office:value-type="float" office:value="220.9" table:style-name="ce1">
            <text:p>220.9</text:p>
          </table:table-cell>
          <table:table-cell table:style-name="ce1"/>
          <table:table-cell office:value-type="float" office:value="-87.527831729612643" table:formula="of:=[.A79]*COS([.B79]*PI()/180)" table:style-name="ce1">
            <text:p>-87.52783173</text:p>
          </table:table-cell>
          <table:table-cell office:value-type="float" office:value="-75.818986228467963" table:formula="of:=[.A79]*SIN([.B79]*PI()/180)" table:style-name="ce1">
            <text:p>-75.81898623</text:p>
          </table:table-cell>
          <table:table-cell table:number-columns-repeated="16379"/>
        </table:table-row>
        <table:table-row table:style-name="ro1">
          <table:table-cell office:value-type="float" office:value="120.2" table:style-name="ce1">
            <text:p>120.2</text:p>
          </table:table-cell>
          <table:table-cell office:value-type="float" office:value="225.6" table:style-name="ce1">
            <text:p>225.6</text:p>
          </table:table-cell>
          <table:table-cell table:style-name="ce1"/>
          <table:table-cell office:value-type="float" office:value="-84.09953352970652" table:formula="of:=[.A80]*COS([.B80]*PI()/180)" table:style-name="ce1">
            <text:p>-84.09953353</text:p>
          </table:table-cell>
          <table:table-cell office:value-type="float" office:value="-85.879616091862985" table:formula="of:=[.A80]*SIN([.B80]*PI()/180)" table:style-name="ce1">
            <text:p>-85.87961609</text:p>
          </table:table-cell>
          <table:table-cell table:number-columns-repeated="16379"/>
        </table:table-row>
        <table:table-row table:style-name="ro1">
          <table:table-cell office:value-type="float" office:value="124.6" table:style-name="ce1">
            <text:p>124.6</text:p>
          </table:table-cell>
          <table:table-cell office:value-type="float" office:value="225.4" table:style-name="ce1">
            <text:p>225.4</text:p>
          </table:table-cell>
          <table:table-cell table:style-name="ce1"/>
          <table:table-cell office:value-type="float" office:value="-87.488270403197205" table:formula="of:=[.A81]*COS([.B81]*PI()/180)" table:style-name="ce1">
            <text:p>-87.4882704</text:p>
          </table:table-cell>
          <table:table-cell office:value-type="float" office:value="-88.71844533047819" table:formula="of:=[.A81]*SIN([.B81]*PI()/180)" table:style-name="ce1">
            <text:p>-88.71844533</text:p>
          </table:table-cell>
          <table:table-cell table:number-columns-repeated="16379"/>
        </table:table-row>
        <table:table-row table:style-name="ro1">
          <table:table-cell office:value-type="float" office:value="130.1" table:style-name="ce1">
            <text:p>130.1</text:p>
          </table:table-cell>
          <table:table-cell office:value-type="float" office:value="224" table:style-name="ce1">
            <text:p>224</text:p>
          </table:table-cell>
          <table:table-cell table:style-name="ce1"/>
          <table:table-cell office:value-type="float" office:value="-93.586108024058504" table:formula="of:=[.A82]*COS([.B82]*PI()/180)" table:style-name="ce1">
            <text:p>-93.58610802</text:p>
          </table:table-cell>
          <table:table-cell office:value-type="float" office:value="-90.37505399671555" table:formula="of:=[.A82]*SIN([.B82]*PI()/180)" table:style-name="ce1">
            <text:p>-90.375054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.5</text:p>
          </table:table-cell>
          <table:table-cell office:value-type="float" office:value="221.5" table:style-name="ce1">
            <text:p>221.5</text:p>
          </table:table-cell>
          <table:table-cell table:style-name="ce1"/>
          <table:table-cell office:value-type="float" office:value="-96.989765842175814" table:formula="of:=[.A83]*COS([.B83]*PI()/180)" table:style-name="ce1">
            <text:p>-96.98976584</text:p>
          </table:table-cell>
          <table:table-cell office:value-type="float" office:value="-85.809296243937965" table:formula="of:=[.A83]*SIN([.B83]*PI()/180)" table:style-name="ce1">
            <text:p>-85.80929624</text:p>
          </table:table-cell>
          <table:table-cell table:number-columns-repeated="16379"/>
        </table:table-row>
        <table:table-row table:style-name="ro1">
          <table:table-cell office:value-type="float" office:value="132.9" table:style-name="ce1">
            <text:p>132.9</text:p>
          </table:table-cell>
          <table:table-cell office:value-type="float" office:value="218" table:style-name="ce1">
            <text:p>218</text:p>
          </table:table-cell>
          <table:table-cell table:style-name="ce1"/>
          <table:table-cell office:value-type="float" office:value="-104.72662915433339" table:formula="of:=[.A84]*COS([.B84]*PI()/180)" table:style-name="ce1">
            <text:p>-104.7266292</text:p>
          </table:table-cell>
          <table:table-cell office:value-type="float" office:value="-81.821410070779933" table:formula="of:=[.A84]*SIN([.B84]*PI()/180)" table:style-name="ce1">
            <text:p>-81.82141007</text:p>
          </table:table-cell>
          <table:table-cell table:number-columns-repeated="16379"/>
        </table:table-row>
        <table:table-row table:style-name="ro1">
          <table:table-cell office:value-type="float" office:value="131.30000000000001" table:style-name="ce1">
            <text:p>131.3</text:p>
          </table:table-cell>
          <table:table-cell office:value-type="float" office:value="214.7" table:style-name="ce1">
            <text:p>214.7</text:p>
          </table:table-cell>
          <table:table-cell table:style-name="ce1"/>
          <table:table-cell office:value-type="float" office:value="-107.94751258733584" table:formula="of:=[.A85]*COS([.B85]*PI()/180)" table:style-name="ce1">
            <text:p>-107.9475126</text:p>
          </table:table-cell>
          <table:table-cell office:value-type="float" office:value="-74.746401426469845" table:formula="of:=[.A85]*SIN([.B85]*PI()/180)" table:style-name="ce1">
            <text:p>-74.74640143</text:p>
          </table:table-cell>
          <table:table-cell table:number-columns-repeated="16379"/>
        </table:table-row>
        <table:table-row table:style-name="ro1">
          <table:table-cell office:value-type="float" office:value="140.80000000000001" table:style-name="ce1">
            <text:p>140.8</text:p>
          </table:table-cell>
          <table:table-cell office:value-type="float" office:value="207.2" table:style-name="ce1">
            <text:p>207.2</text:p>
          </table:table-cell>
          <table:table-cell table:style-name="ce1"/>
          <table:table-cell office:value-type="float" office:value="-125.22982535941472" table:formula="of:=[.A86]*COS([.B86]*PI()/180)" table:style-name="ce1">
            <text:p>-125.2298254</text:p>
          </table:table-cell>
          <table:table-cell office:value-type="float" office:value="-64.359388129864101" table:formula="of:=[.A86]*SIN([.B86]*PI()/180)" table:style-name="ce1">
            <text:p>-64.35938813</text:p>
          </table:table-cell>
          <table:table-cell table:number-columns-repeated="16379"/>
        </table:table-row>
        <table:table-row table:style-name="ro1">
          <table:table-cell office:value-type="float" office:value="145.69999999999999" table:style-name="ce1">
            <text:p>145.7</text:p>
          </table:table-cell>
          <table:table-cell office:value-type="float" office:value="206.2" table:style-name="ce1">
            <text:p>206.2</text:p>
          </table:table-cell>
          <table:table-cell table:style-name="ce1"/>
          <table:table-cell office:value-type="float" office:value="-130.73054446154967" table:formula="of:=[.A87]*COS([.B87]*PI()/180)" table:style-name="ce1">
            <text:p>-130.7305445</text:p>
          </table:table-cell>
          <table:table-cell office:value-type="float" office:value="-64.327402751757191" table:formula="of:=[.A87]*SIN([.B87]*PI()/180)" table:style-name="ce1">
            <text:p>-64.32740275</text:p>
          </table:table-cell>
          <table:table-cell table:number-columns-repeated="16379"/>
        </table:table-row>
        <table:table-row table:style-name="ro1">
          <table:table-cell office:value-type="float" office:value="156.9" table:style-name="ce1">
            <text:p>156.9</text:p>
          </table:table-cell>
          <table:table-cell office:value-type="float" office:value="202.5" table:style-name="ce1">
            <text:p>202.5</text:p>
          </table:table-cell>
          <table:table-cell table:style-name="ce1"/>
          <table:table-cell office:value-type="float" office:value="-144.95669865102093" table:formula="of:=[.A88]*COS([.B88]*PI()/180)" table:style-name="ce1">
            <text:p>-144.9566987</text:p>
          </table:table-cell>
          <table:table-cell office:value-type="float" office:value="-60.043030538082505" table:formula="of:=[.A88]*SIN([.B88]*PI()/180)" table:style-name="ce1">
            <text:p>-60.04303054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9.1" table:style-name="ce1">
            <text:p>199.1</text:p>
          </table:table-cell>
          <table:table-cell table:style-name="ce1"/>
          <table:table-cell office:value-type="float" office:value="-153.08172376952001" table:formula="of:=[.A89]*COS([.B89]*PI()/180)" table:style-name="ce1">
            <text:p>-153.0817238</text:p>
          </table:table-cell>
          <table:table-cell office:value-type="float" office:value="-53.009299634614834" table:formula="of:=[.A89]*SIN([.B89]*PI()/180)" table:style-name="ce1">
            <text:p>-53.00929963</text:p>
          </table:table-cell>
          <table:table-cell table:number-columns-repeated="16379"/>
        </table:table-row>
        <table:table-row table:style-name="ro1">
          <table:table-cell office:value-type="float" office:value="164.9" table:style-name="ce1">
            <text:p>164.9</text:p>
          </table:table-cell>
          <table:table-cell office:value-type="float" office:value="196.9" table:style-name="ce1">
            <text:p>196.9</text:p>
          </table:table-cell>
          <table:table-cell table:style-name="ce1"/>
          <table:table-cell office:value-type="float" office:value="-157.77856001109944" table:formula="of:=[.A90]*COS([.B90]*PI()/180)" table:style-name="ce1">
            <text:p>-157.77856</text:p>
          </table:table-cell>
          <table:table-cell office:value-type="float" office:value="-47.936791724351856" table:formula="of:=[.A90]*SIN([.B90]*PI()/180)" table:style-name="ce1">
            <text:p>-47.93679172</text:p>
          </table:table-cell>
          <table:table-cell table:number-columns-repeated="16379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Reinhard Lenz</meta:initial-creator>
    <dc:creator>Reinhard Lenz</dc:creator>
    <meta:creation-date>2026-06-27T09:22:12Z</meta:creation-date>
    <dc:date>2026-06-29T05:53:5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475.6096062992126pt" svg:width="729.511889763779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</chart:axis>
          <chart:series chart:values-cell-range-address="k4.$B$1:.$B$90" chart:class="chart:scatter" chart:attached-axis="primary-y" chart:style-name="G0S0">
            <chart:domain table:cell-range-address="k4.$A$1:.$A$90"/>
            <chart:data-point chart:repeated="9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20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5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5.6097637795275pt" svg:width="729.512204724409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k4.$E$1:.$E$90" chart:class="chart:scatter" chart:attached-axis="primary-y" chart:style-name="G0S0">
            <chart:domain table:cell-range-address="k4.$D$1:.$D$90"/>
            <chart:data-point chart:repeated="9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